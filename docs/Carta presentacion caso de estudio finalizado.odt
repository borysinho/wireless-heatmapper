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right" style:justify-single-word="false"/>
    </style:style>
    <style:style style:name="P2" style:family="paragraph" style:parent-style-name="Text_20_body">
      <style:paragraph-properties fo:text-align="left" style:justify-single-word="false"/>
    </style:style>
    <style:style style:name="P3" style:family="paragraph" style:parent-style-name="Text_20_body">
      <style:paragraph-properties fo:text-align="justify" style:justify-single-word="false"/>
      <style:text-properties fo:font-weight="bold"/>
    </style:style>
    <style:style style:name="P4" style:family="paragraph" style:parent-style-name="Text_20_body">
      <style:paragraph-properties fo:text-align="justify" style:justify-single-word="false"/>
    </style:style>
    <style:style style:name="P5" style:family="paragraph">
      <style:paragraph-properties fo:text-align="center"/>
      <style:text-properties style:font-name="Liberation Serif" fo:font-size="12pt"/>
    </style:style>
    <style:style style:name="P6" style:family="paragraph">
      <loext:graphic-properties draw:fill="none" draw:fill-color="#ffffff"/>
      <style:paragraph-properties fo:text-align="center"/>
      <style:text-properties style:font-name="Liberation Serif" fo:font-size="12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style:font-name="Liberation Serif" fo:font-size="12pt"/>
    </style:style>
    <style:style style:name="T4" style:family="text">
      <style:text-properties style:font-name="Liberation Serif" fo:font-size="12pt" fo:font-weight="bold" style:font-weight-asian="bold" style:font-weight-complex="bold"/>
    </style:style>
    <style:style style:name="gr1" style:family="graphic">
      <style:graphic-properties draw:stroke="none" svg:stroke-color="#000000" draw:fill="none" draw:fill-color="#ffffff" fo:min-height="1.8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639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nta Cruz de la Sierra, 30 de junio de 2026</text:p>
      <text:p text:style-name="P2"/>
      <text:p text:style-name="P2"/>
      <text:p text:style-name="P2">Señor:<text:line-break/>Jordan Jessie Quiroga Ferreira<text:line-break/><text:span text:style-name="T1">DIRECTOR DE PROYECTOS - BULLDOG TECH</text:span><text:line-break/>Presente.-</text:p>
      <text:p text:style-name="P3">REF.- PRESENTACIÓN DE CASO DE ESTUDIO FINALIZADO</text:p>
      <text:p text:style-name="P4"/>
      <text:p text:style-name="P4"/>
      <text:p text:style-name="P4">De nuestra mayor consideración:</text:p>
      <text:p text:style-name="P4">Por medio de la presente, tenemos a bien dirigirnos a usted para hacerle llegar un cordial saludo y, al mismo tiempo, presentar formalmente el caso de estudio finalizado titulado <text:span text:style-name="T2">"WIRELESS HEATMAPPER"</text:span>, desarrollado en el marco de la materia Taller de Grado I de la carrera de Ingeniería Informática de la Universidad Autónoma "Gabriel René Moreno".</text:p>
      <text:p text:style-name="P4">El presente caso de estudio fue elaborado tomando como referencia la información proporcionada por Bulldog Tech., con el propósito de analizar la problemática identificada y plantear una propuesta de solución tecnológica orientada al levantamiento, análisis y visualización de cobertura inalámbrica mediante mapas de calor.</text:p>
      <text:p text:style-name="P4">Como estudiantes responsables del proyecto, dejamos constancia de que se ha concluido la elaboración del documento final del caso de estudio, incluyendo el análisis del contexto, requerimientos, planificación, diseño de la solución propuesta y demás elementos académicos solicitados por la materia.</text:p>
      <text:p text:style-name="P4">Agradecemos sinceramente la colaboración brindada por su empresa durante el desarrollo del presente trabajo, ya que su apoyo permitió contextualizar el proyecto en un entorno real y fortalecer su valor académico y práctico.</text:p>
      <text:p text:style-name="P4">Sin otro particular, nos despedimos reiterándole nuestros agradecimientos y consideración distinguida.</text:p>
      <text:p text:style-name="P4">Atentamente,</text:p>
      <text:p text:style-name="Text_20_body"/>
      <text:p text:style-name="Text_20_body"/>
      <text:p text:style-name="Text_20_body"><draw:frame text:anchor-type="paragraph" draw:z-index="0" draw:name="Marco de texto 1" draw:style-name="gr1" draw:text-style-name="P6" svg:width="7.118cm" svg:height="1.95cm" svg:x="1.545cm" svg:y="0.425cm"><draw:text-box><text:p text:style-name="P5"><text:span text:style-name="T3">_____________________________</text:span></text:p><text:p text:style-name="P5"><text:span text:style-name="T3">Jhasmany Jhunior Fernández Ortega</text:span><text:span text:style-name="T3"><text:line-break/></text:span><text:span text:style-name="T4">Reg. 207025509</text:span><text:span text:style-name="T4"><text:line-break/></text:span><text:span text:style-name="T4">C.I. 7700476 SCZ.</text:span></text:p></draw:text-box></draw:frame><draw:frame text:anchor-type="paragraph" draw:z-index="1" draw:name="Marco de texto 2" draw:style-name="gr2" draw:text-style-name="P6" svg:width="6.166cm" svg:height="1.95cm" svg:x="10.091cm" svg:y="0.452cm"><draw:text-box><text:p text:style-name="P5"><text:span text:style-name="T3">___________________________</text:span></text:p><text:p text:style-name="P5"><text:span text:style-name="T3">Herland Borys Quiroga Flores</text:span><text:span text:style-name="T3"><text:line-break/></text:span><text:span text:style-name="T4">Reg. 200104373</text:span><text:span text:style-name="T4"><text:line-break/></text:span><text:span text:style-name="T4">C.I. 4697564 SCZ.</text:span></text:p></draw:text-box></draw:fram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SV"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SV"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6-30T15:50:32.732851075</dc:date>
    <meta:editing-duration>PT11M27S</meta:editing-duration>
    <meta:editing-cycles>5</meta:editing-cycles>
    <meta:generator>LibreOffice/26.2.4.2$Linux_X86_64 LibreOffice_project/620$Build-2</meta:generator>
    <meta:print-date>2026-06-30T15:50:14.184869204</meta:print-date>
    <meta:printed-by>Archivos PDF</meta:printed-by>
    <meta:document-statistic meta:table-count="0" meta:image-count="0" meta:object-count="0" meta:page-count="1" meta:paragraph-count="10" meta:word-count="218" meta:character-count="1514" meta:non-whitespace-character-count="1306"/>
  </office:meta>
</office:document-meta>
</file>